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9161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lot&quot;;&quot;fit&quot;;&quot;build&quot;;&quot;data_p&quot;)" table:allow-empty-cell="true" table:display-list="unsorted" table:base-cell-address="Sheet1.E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ile</text:p>
          </table:table-cell>
          <table:table-cell table:style-name="ce7" office:value-type="string" calcext:value-type="string">
            <text:p>Old_code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8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thods</text:p>
          </table:table-cell>
          <table:table-cell table:style-name="ce9" office:value-type="string" calcext:value-type="string">
            <text:p>Assigned new fi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__init__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 to s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ph2cart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rt2sph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bspline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yc_idx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yc_data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urse_comput_eval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ph_crs_avrg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rt_vel_avrg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i_ro_bounds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t_sph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t_cart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cart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sph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lot_cart</text:p>
          </table:table-cell>
          <table:table-cell table:style-name="ce10" table:content-validation-name="val1" office:value-type="string" calcext:value-type="string">
            <text:p>plo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lot_sph</text:p>
          </table:table-cell>
          <table:table-cell table:style-name="ce11" table:content-validation-name="val1" office:value-type="string" calcext:value-type="string">
            <text:p>pl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Order of code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1) data_p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2) fit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3) build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4) plot</text:p>
          </table:table-cell>
          <table:table-cell/>
          <table:table-cell table:style-name="ce5"/>
          <table:table-cell/>
        </table:table-row>
        <table:table-row table:style-name="ro1" table:number-rows-repeated="14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3:32.404580068</meta:creation-date>
    <dc:date>2025-09-22T16:21:57.277005471</dc:date>
    <meta:editing-duration>PT8M14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